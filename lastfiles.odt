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f15d" officeooo:paragraph-rsid="0001f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my new channe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9T21:37:20.592254800</meta:creation-date>
    <dc:date>2026-06-29T21:37:31.907261600</dc:date>
    <meta:editing-duration>PT11S</meta:editing-duration>
    <meta:editing-cycles>1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1" meta:word-count="5" meta:character-count="25" meta:non-whitespace-character-count="21"/>
  </office:meta>
</office:document-meta>
</file>